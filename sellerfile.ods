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37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8.241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14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email_address</text:p>
          </table:table-cell>
          <table:table-cell office:value-type="string">
            <text:p>password</text:p>
          </table:table-cell>
          <table:table-cell office:value-type="string">
            <text:p>company_name</text:p>
          </table:table-cell>
          <table:table-cell office:value-type="string">
            <text:p>type</text:p>
          </table:table-cell>
          <table:table-cell table:number-columns-repeated="1020"/>
        </table:table-row>
        <table:table-row table:style-name="ro2">
          <table:table-cell office:value-type="string">
            <text:p>salesinq@peterpaul.com.ph</text:p>
          </table:table-cell>
          <table:table-cell office:value-type="string">
            <text:p>peterpaul</text:p>
          </table:table-cell>
          <table:table-cell table:style-name="ce2" office:value-type="string">
            <text:p>Peter Paul Philippine Corporation </text:p>
          </table:table-cell>
          <table:table-cell office:value-type="string">
            <text:p>seller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8">2026-06-18</text:date>, <text:time>15:1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bezz</meta:initial-creator>
    <meta:creation-date>2026-06-18T15:14:27.74</meta:creation-date>
    <dc:date>2026-06-18T15:19:30.44</dc:date>
    <dc:creator>john bezz</dc:creator>
    <meta:editing-duration>PT5M3S</meta:editing-duration>
    <meta:editing-cycles>1</meta:editing-cycles>
    <meta:document-statistic meta:table-count="3" meta:cell-count="8" meta:object-count="0"/>
    <meta:generator>OpenOffice/4.1.6$Win32 OpenOffice.org_project/416m1$Build-9790</meta:generator>
  </office:meta>
</office:document-meta>
</file>